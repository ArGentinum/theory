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Segoe UI Symbol'" style:font-family-asian="'Segoe UI Symbol'" style:font-family-complex="'Segoe UI Symbo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Segoe UI Symbol'" style:font-family-asian="'Segoe UI Symbol'" style:font-family-complex="'Segoe UI Symbo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Segoe UI Symbol'" style:font-family-asian="'Segoe UI Symbol'" style:font-family-complex="'Segoe UI Symbo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Segoe UI Symbol'" style:font-family-asian="'Segoe UI Symbol'" style:font-family-complex="'Segoe UI Symbo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Segoe UI Symbol'" style:font-family-asian="'Segoe UI Symbol'" style:font-family-complex="'Segoe UI Symbo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67"/></text:span><text:span text:style-name="T2">COMPUTER NETWORKING</text:span><text:span text:style-name="T3"/></text:p>
      <text:p text:style-name="P1"><text:span text:style-name="T4">IP Address: </text:span></text:p>
      <text:p text:style-name="P1"><text:span text:style-name="T5">-&gt;</text:span><text:span text:style-name="T6">An ip address is a unique identifying address assigned to every computer that is connected to the internet. It is a numeric label that is assigned to devices which use the internet to cimmunicate.Computers that communicate over the internet or via local networksshare information with a specific location using IP address.</text:span></text:p>
      <text:p text:style-name="P1"><text:span text:style-name="T7">-&gt;</text:span><text:span text:style-name="T8">IP Addresses have two distinct versions or standards. The internet protocol version 4(ipv4) has space upto 4 billion ip addresses and the internet protocol version 6 has space upto trillions of ip addresses, which accounts for new broad of devices in addition to computers.There are also other types of ip addresses including the ipv3 and ipv6 such as private,static and dynamic ip addresses.</text:span></text:p>
      <text:p text:style-name="P1"><text:span text:style-name="T8"/></text:p>
      <text:p text:style-name="P1"><text:span text:style-name="T9">Public IP:</text:span></text:p>
      <text:p text:style-name="P1"><text:span text:style-name="T10">-&gt;</text:span><text:span text:style-name="T11">this is our address on the internet. Eg:<text:s text:c="2"/>492.204.12.192</text:span></text:p>
      <text:p text:style-name="P1"><text:span text:style-name="T12">-&gt;</text:span><text:span text:style-name="T13">all the home devices that are connected to the internet via a router share the same public ip.</text:span></text:p>
      <text:p text:style-name="P1"><text:span text:style-name="T14">-&gt;</text:span><text:span text:style-name="T15">public ip is provided by the isp to the router that is given to us</text:span></text:p>
      <text:p text:style-name="P1"><text:span text:style-name="T15">eg:</text:span></text:p>
      <text:p text:style-name="P1"><text:span text:style-name="T15"><text:s/>Laptop</text:span></text:p>
      <text:p text:style-name="P1"><text:span text:style-name="T15"><text:s text:c="4"/></text:span><text:span text:style-name="T16">│</text:span><text:span text:style-name="T17"/></text:p>
      <text:p text:style-name="P1"><text:span text:style-name="T17">Phone</text:span></text:p>
      <text:p text:style-name="P1"><text:span text:style-name="T17"><text:s text:c="4"/></text:span><text:span text:style-name="T18">│</text:span><text:span text:style-name="T19"/></text:p>
      <text:p text:style-name="P1"><text:span text:style-name="T19">TV</text:span></text:p>
      <text:p text:style-name="P1"><text:span text:style-name="T19"><text:s text:c="4"/></text:span><text:span text:style-name="T20">│</text:span><text:span text:style-name="T21"/></text:p>
      <text:p text:style-name="P1"><text:span text:style-name="T21">Router</text:span></text:p>
      <text:p text:style-name="P1"><text:span text:style-name="T21"><text:s text:c="4"/></text:span><text:span text:style-name="T22">│</text:span><text:span text:style-name="T23"/></text:p>
      <text:p text:style-name="P1"><text:span text:style-name="T23">Public IP</text:span></text:p>
      <text:p text:style-name="P1"><text:span text:style-name="T23"><text:s text:c="4"/></text:span><text:span text:style-name="T24">│</text:span><text:span text:style-name="T25"/></text:p>
      <text:p text:style-name="P1"><text:span text:style-name="T25">Internet</text:span></text:p>
      <text:p text:style-name="P1"><text:span text:style-name="T25"/></text:p>
      <text:p text:style-name="P1"><text:span text:style-name="T26">Private IP:</text:span></text:p>
      <text:p text:style-name="P1"><text:span text:style-name="T27">Inside our home network, different devices have different ip addresses</text:span></text:p>
      <text:p text:style-name="P1"><text:span text:style-name="T27">eg: laptop 192.134.1.2 , phone 192.134.1.3 etc</text:span></text:p>
      <text:p text:style-name="P1"><text:span text:style-name="T27"/></text:p>
      <text:p text:style-name="P1"><text:span text:style-name="T27"/></text:p>
      <text:p text:style-name="P1"><text:span text:style-name="T28">Working of computer networks:</text:span></text:p>
      <text:p text:style-name="P1"><text:span text:style-name="T29">Each device in the network follows predefined rules to ensure that data is transmitted accurately, efficiently and securely</text:span><text:span text:style-name="T30"/></text:p>
      <text:p text:style-name="P1"><text:span text:style-name="T30">-&gt;</text:span><text:span text:style-name="T31">A network consists of nodes sucha as computers,servers.switches and routers that send or recieve data.</text:span></text:p>
      <text:p text:style-name="P1"><text:span text:style-name="T32">-&gt;</text:span><text:span text:style-name="T33">these nodes are connected through links which may be wired(cables,optical fiber) or wiresless(wifi ,bluetooth</text:span></text:p>
      <text:p text:style-name="P1"><text:span text:style-name="T34">-&gt;</text:span><text:span text:style-name="T35">when data is sent it is broken into small chunks called packets and transmitted across the network.</text:span></text:p>
      <text:p text:style-name="P1"><text:span text:style-name="T35">-&gt;Protocols define how the data is transmitteed, formatted,recieved and acknowledged</text:span></text:p>
      <text:p text:style-name="P1"><text:span text:style-name="T36">-&gt;</text:span><text:span text:style-name="T37">each device connected to the internet is uniquely identified by an ip address, which ensures that data reaches the right destination.</text:span></text:p>
      <text:p text:style-name="P1"><text:span text:style-name="T38">-&gt;</text:span><text:span text:style-name="T39">network devices like switches and routers forward data packets along the best posssible path</text:span></text:p>
      <text:p text:style-name="P1"><text:span text:style-name="T40">-&gt;</text:span><text:span text:style-name="T41">Security mechanisms like firewalls , monirors data and blaocks data besed on security rules.</text:span></text:p>
      <text:p text:style-name="P1"><text:span text:style-name="T41"/></text:p>
      <text:p text:style-name="P1"><text:span text:style-name="T41"/></text:p>
      <text:p text:style-name="P1"><text:span text:style-name="T41"/></text:p>
      <text:p text:style-name="P1"><text:span text:style-name="T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