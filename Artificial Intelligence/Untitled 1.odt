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06506" officeooo:paragraph-rsid="0010650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a655" officeooo:paragraph-rsid="0011a65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1a655" officeooo:paragraph-rsid="0011a655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2897c" officeooo:paragraph-rsid="0012897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6506" officeooo:paragraph-rsid="00106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1a655" officeooo:paragraph-rsid="0011a65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2897c" officeooo:paragraph-rsid="0012897c" style:font-weight-asian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06506" style:font-style-asian="italic" style:font-weight-asian="bold" style:font-style-complex="italic" style:font-weight-complex="bold"/>
    </style:style>
    <style:style style:name="T3" style:family="text">
      <style:text-properties officeooo:rsid="0011a655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Introduction to artificial intelligence</text:p>
      <text:p text:style-name="P5">Artifical intellence is a branch of computer science that aims to create machines capable of performing tasks that would normally require human intelligence.</text:p>
      <text:p text:style-name="P5">These tasks include:</text:p>
      <text:p text:style-name="P5">-&gt;learning</text:p>
      <text:p text:style-name="P5">-&gt;reasoning</text:p>
      <text:p text:style-name="P5">-&gt;problem solving</text:p>
      <text:p text:style-name="P5">-&gt;decision making</text:p>
      <text:p text:style-name="P5">-&gt;understanding languages</text:p>
      <text:p text:style-name="P5">-&gt;planning</text:p>
      <text:p text:style-name="P5">-&gt;recognising images</text:p>
      <text:p text:style-name="P5">-&gt;playing games</text:p>
      <text:p text:style-name="P5"/>
      <text:p text:style-name="P5">John McCarthy(1956) known as the “father of AI”,defined AI as “the science and engineering of making intelligent machines”</text:p>
      <text:p text:style-name="P5">AI is the study of intelligent agents that percieve their environment and take actions to maximize their chances of achieving goals.</text:p>
      <text:p text:style-name="P5"/>
      <text:p text:style-name="P5">Examples: <text:span text:style-name="T3">Chatgpt,google assistant,siri, self-driving cars,face recognition,chess playing programs,recommendation systems(Netflix,YouTube)</text:span></text:p>
      <text:p text:style-name="P5"/>
      <text:p text:style-name="P5"/>
      <text:p text:style-name="P2">2.Characteristics of AI:</text:p>
      <text:p text:style-name="P6">An AI system should be able to:</text:p>
      <text:p text:style-name="P6">-&gt;learn from experience</text:p>
      <text:p text:style-name="P6">-&gt;understand language</text:p>
      <text:p text:style-name="P6">-&gt;perceive surroundings</text:p>
      <text:p text:style-name="P6">-&gt;solve problems</text:p>
      <text:p text:style-name="P6">-&gt;reason logically</text:p>
      <text:p text:style-name="P6">-&gt;make decisions</text:p>
      <text:p text:style-name="P6">-&gt;adapt to new situations</text:p>
      <text:p text:style-name="P6"/>
      <text:p text:style-name="P6"/>
      <text:p text:style-name="P6"/>
      <text:p text:style-name="P2">3.Applications of AI:<text:line-break/></text:p>
      <text:p text:style-name="P3">Healthcare:</text:p>
      <text:p text:style-name="P3">-&gt;<text:span text:style-name="T4">Disease diagnosis</text:span></text:p>
      <text:p text:style-name="P3"><text:span text:style-name="T4">-&gt;Medical image analysis</text:span></text:p>
      <text:p text:style-name="P3"><text:span text:style-name="T4">-&gt;drug discovery</text:span></text:p>
      <text:p text:style-name="P3"><text:span text:style-name="T4">-&gt;robot assisted surgety</text:span></text:p>
      <text:p text:style-name="P3"><text:span text:style-name="T4"/></text:p>
      <text:p text:style-name="P3">Education:</text:p>
      <text:p text:style-name="P6">-&gt;personalized learning</text:p>
      <text:p text:style-name="P6">-&gt;automatic grading</text:p>
      <text:p text:style-name="P6">-&gt;intelligent tutorial systems</text:p>
      <text:p text:style-name="P6"/>
      <text:p text:style-name="P3"/>
      <text:p text:style-name="P3"/>
      <text:p text:style-name="P3"/>
      <text:p text:style-name="P3"><text:soft-page-break/>Banking:</text:p>
      <text:p text:style-name="P6">-&gt;fraud detection</text:p>
      <text:p text:style-name="P6">-&gt;loan approval</text:p>
      <text:p text:style-name="P6">-&gt;customer service chatbots</text:p>
      <text:p text:style-name="P6"/>
      <text:p text:style-name="P4">Transportaion:</text:p>
      <text:p text:style-name="P7">--&gt;self driving cars</text:p>
      <text:p text:style-name="P7">-&gt;route optimisation</text:p>
      <text:p text:style-name="P7">-&gt;traffic prediction</text:p>
      <text:p text:style-name="P7"/>
      <text:p text:style-name="P4">Entertainment:</text:p>
      <text:p text:style-name="P4"><text:span text:style-name="T4">-&gt;movie recommendations</text:span></text:p>
      <text:p text:style-name="P4"><text:span text:style-name="T4">-&gt;music recommendations</text:span></text:p>
      <text:p text:style-name="P4"><text:span text:style-name="T4">-&gt;video game Ai</text:span></text:p>
      <text:p text:style-name="P4"><text:span text:style-name="T4"/></text:p>
      <text:p text:style-name="P4">Agriculture:</text:p>
      <text:p text:style-name="P7">-&gt;smart irrigation</text:p>
      <text:p text:style-name="P7">-&gt;pest detection</text:p>
      <text:p text:style-name="P7">-&gt;crop monitoring</text:p>
      <text:p text:style-name="P7"/>
      <text:p text:style-name="P4">Manufacturing:</text:p>
      <text:p text:style-name="P7">-&gt;quality inspection</text:p>
      <text:p text:style-name="P7">-&gt;industrial robots</text:p>
      <text:p text:style-name="P7">-&gt;predictive maintenance</text:p>
      <text:p text:style-name="P4"/>
      <text:p text:style-name="P2"/>
      <text:p text:style-name="P2"/>
      <text:p text:style-name="P6"/>
      <text:p text:style-name="P6"/>
      <text:p text:style-name="P5"/>
      <text:p text:style-name="P5"/>
      <text:p text:style-name="P5"/>
      <text:p text:style-name="P3"/>
      <text:p text:style-name="P5"/>
      <text:p text:style-name="P6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106506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31"/><text:span text:style-name="MT1"><text:s text:c="3"/></text:span><text:span text:style-name="MT2">ARTIFICIAL INTELLIGENC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5T11:43:23.031819518</meta:creation-date>
    <dc:date>2026-07-15T12:10:50.119957728</dc:date>
    <meta:editing-duration>PT3M27S</meta:editing-duration>
    <meta:editing-cycles>1</meta:editing-cycles>
    <meta:document-statistic meta:table-count="0" meta:image-count="0" meta:object-count="0" meta:page-count="2" meta:paragraph-count="54" meta:word-count="181" meta:character-count="1543" meta:non-whitespace-character-count="1382"/>
    <meta:generator>LibreOffice/24.2.7.2$Linux_X86_64 LibreOffice_project/420$Build-2</meta:generator>
  </office:meta>
</office:document-meta>
</file>