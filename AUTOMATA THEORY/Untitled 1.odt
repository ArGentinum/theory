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2823" officeooo:paragraph-rsid="0006282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2823" officeooo:paragraph-rsid="0006282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7b8ac" officeooo:paragraph-rsid="0007b8ac" style:font-weight-asian="normal" style:font-weight-complex="normal"/>
    </style:style>
    <style:style style:name="P4" style:family="paragraph" style:parent-style-name="Standard">
      <style:text-properties style:text-underline-style="none" officeooo:rsid="00062823" officeooo:paragraph-rsid="00062823"/>
    </style:style>
    <style:style style:name="P5" style:family="paragraph" style:parent-style-name="Standard">
      <style:text-properties style:text-underline-style="none" fo:font-weight="normal" officeooo:rsid="0007b8ac" officeooo:paragraph-rsid="0007b8ac" style:font-weight-asian="normal" style:font-weight-complex="normal"/>
    </style:style>
    <style:style style:name="T1" style:family="text">
      <style:text-properties fo:font-style="italic" fo:font-weight="bold" officeooo:rsid="00062823" style:font-style-asian="italic" style:font-weight-asian="bold" style:font-style-complex="italic" style:font-weight-complex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1.INTRODUCTION TO AUTOMATA</text:p>
      <text:p text:style-name="P1"/>
      <text:p text:style-name="P1"/>
      <text:p text:style-name="P1">WHAT IS AUTOMATA?</text:p>
      <text:p text:style-name="P4">-&gt;An automation (plural:automata) is a mathematical model of a machine that accepts or rejects strings based on predefined rules.</text:p>
      <text:p text:style-name="P4"/>
      <text:p text:style-name="P4">-&gt;it is a machine that answers to only one question: DOES THIS STRING BELONG TO M LANGUAGE?</text:p>
      <text:p text:style-name="P4"><text:s/></text:p>
      <text:p text:style-name="P4">-&gt;eg: suppose the language contains only strings that end with 1</text:p>
      <text:p text:style-name="P4"/>
      <text:p text:style-name="P4"><text:s text:c="10"/>input: 101</text:p>
      <text:p text:style-name="P4"><text:s text:c="10"/>machine: accepted<text:line-break/><text:line-break/> <text:s text:c="9"/>input:100<text:line-break/> <text:s text:c="9"/>machine: rejected<text:line-break/><text:line-break/></text:p>
      <text:p text:style-name="P4"/>
      <text:p text:style-name="P1">USES:</text:p>
      <text:p text:style-name="P4">automata are used in </text:p>
      <text:p text:style-name="P4">-&gt;compiler design</text:p>
      <text:p text:style-name="P4">-&gt;text searching</text:p>
      <text:p text:style-name="P4">-&gt;pattern matching</text:p>
      <text:p text:style-name="P4">-&gt;artifical intelligence</text:p>
      <text:p text:style-name="P4">-&gt;natural language processing</text:p>
      <text:p text:style-name="P4">-&gt;digital circuit design</text:p>
      <text:p text:style-name="P4"/>
      <text:p text:style-name="P4"/>
      <text:p text:style-name="P4"/>
      <text:p text:style-name="P1">WHY STUDY AUTOMATA?</text:p>
      <text:p text:style-name="P4">Automata helps answer questions like:</text:p>
      <text:p text:style-name="P4">-&gt;can a computer recognise this language?</text:p>
      <text:p text:style-name="P4">-&gt;how much memory is required</text:p>
      <text:p text:style-name="P4">-&gt;can a problem even be solved?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ALPHABETS, STRINGS AND LANGUAGES</text:p>
      <text:p text:style-name="P5">These are the building blocks.</text:p>
      <text:p text:style-name="P5"/>
      <text:p text:style-name="P3">Alphabet:</text:p>
      <text:p text:style-name="P3"><text:span text:style-name="T2">-&gt; An alphabet is a finite non-empty set of symbols</text:span></text:p>
      <text:p text:style-name="P3"><text:span text:style-name="T2"><text:s text:c="17"/>eg: e={0,1}</text:span></text:p>
      <text:p text:style-name="P3"><text:span text:style-name="T2"><text:s text:c="23"/>e={a,b}</text:span></text:p>
      <text:p text:style-name="P3"><text:span text:style-name="T2"><text:s text:c="23"/>e={A,B,C}</text:span></text:p>
      <text:p text:style-name="P3"><text:span text:style-name="T2"/></text:p>
      <text:p text:style-name="P3"><text:span text:style-name="T2">-&gt;the symbols themselves have no meaning.</text:span></text:p>
      <text:p text:style-name="P3"><text:span text:style-name="T2"/></text:p>
      <text:p text:style-name="P3"><text:span text:style-name="T2"/></text:p>
      <text:p text:style-name="P3"><text:span text:style-name="T2"><text:s text:c="9"/></text:span></text:p>
      <text:p text:style-name="P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tyle="italic" fo:font-weight="bold" officeooo:rsid="00062823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56"/><text:span text:style-name="MT1">AUTOMATA THEOR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5T11:06:19.013716398</meta:creation-date>
    <dc:date>2026-07-15T11:41:23.871111282</dc:date>
    <meta:editing-duration>PT11M11S</meta:editing-duration>
    <meta:editing-cycles>1</meta:editing-cycles>
    <meta:document-statistic meta:table-count="0" meta:image-count="0" meta:object-count="0" meta:page-count="2" meta:paragraph-count="31" meta:word-count="136" meta:character-count="1072" meta:non-whitespace-character-count="792"/>
    <meta:generator>LibreOffice/24.2.7.2$Linux_X86_64 LibreOffice_project/420$Build-2</meta:generator>
  </office:meta>
</office:document-meta>
</file>